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rsid="0022de84" officeooo:paragraph-rsid="0022de84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22de84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22ef7e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2491d1" style:font-size-asian="12pt" style:font-size-complex="12pt"/>
    </style:style>
    <style:style style:name="T1" style:family="text">
      <style:text-properties officeooo:rsid="0022de84"/>
    </style:style>
    <style:style style:name="T2" style:family="text">
      <style:text-properties fo:font-variant="normal" fo:text-transform="none" fo:color="#36211b" fo:font-style="normal" fo:font-weight="normal"/>
    </style:style>
    <style:style style:name="T3" style:family="text">
      <style:text-properties fo:font-variant="normal" fo:text-transform="none" fo:color="#36211b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36211b" fo:font-style="normal" fo:font-weight="normal" officeooo:rsid="0022de84" style:font-weight-asian="normal" style:font-weight-complex="normal"/>
    </style:style>
    <style:style style:name="T5" style:family="text">
      <style:text-properties fo:font-variant="normal" fo:text-transform="none" fo:color="#36211b" fo:font-style="normal" fo:font-weight="normal" officeooo:rsid="00190631" style:font-weight-asian="normal" style:font-weight-complex="normal"/>
    </style:style>
    <style:style style:name="T6" style:family="text">
      <style:text-properties fo:font-variant="normal" fo:text-transform="none" fo:color="#36211b" fo:letter-spacing="normal" fo:font-style="normal" fo:font-weight="normal" officeooo:rsid="0022de84" style:font-weight-asian="normal" style:font-weight-complex="normal"/>
    </style:style>
    <style:style style:name="T7" style:family="text">
      <style:text-properties fo:font-variant="normal" fo:text-transform="none" fo:color="#36211b" fo:letter-spacing="normal" fo:font-style="normal" fo:font-weight="normal" officeooo:rsid="0022ef7e" style:font-weight-asian="normal" style:font-weight-complex="normal"/>
    </style:style>
    <style:style style:name="T8" style:family="text">
      <style:text-properties fo:font-variant="normal" fo:text-transform="none" fo:color="#36211b" fo:letter-spacing="normal" fo:font-style="normal" fo:font-weight="normal" officeooo:rsid="002491d1" style:font-weight-asian="normal" style:font-weight-complex="normal"/>
    </style:style>
    <style:style style:name="T9" style:family="text">
      <style:text-properties fo:font-variant="normal" fo:text-transform="none" fo:color="#36211b" fo:letter-spacing="normal" fo:font-style="normal" fo:font-weight="bold" officeooo:rsid="0022de84" style:font-weight-asian="normal" style:font-weight-complex="normal"/>
    </style:style>
    <style:style style:name="T10" style:family="text">
      <style:text-properties fo:font-variant="normal" fo:text-transform="none" fo:color="#0d0d0d" fo:letter-spacing="normal" fo:font-style="normal" fo:font-weight="normal" officeooo:rsid="00190631" style:font-weight-asian="normal" style:font-weight-complex="normal"/>
    </style:style>
    <style:style style:name="T11" style:family="text">
      <style:text-properties fo:font-variant="normal" fo:text-transform="none" fo:color="#0d0d0d" fo:letter-spacing="normal" fo:font-style="normal" fo:font-weight="normal" officeooo:rsid="0022de84" style:font-weight-asian="normal" style:font-weight-complex="normal"/>
    </style:style>
    <style:style style:name="T12" style:family="text">
      <style:text-properties fo:font-variant="normal" fo:text-transform="none" fo:color="#0d0d0d" fo:letter-spacing="normal" fo:font-style="normal" fo:font-weight="normal" officeooo:rsid="0022ef7e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Currently IIIT Hyderabad lacks a centralized,user friendly web application to streamline the recruitment process,creation of which could significantly enhance the efficiency of the recruitment process.</text:p>
      <text:p text:style-name="P2"/>
      <text:p text:style-name="P3"><text:span text:style-name="T1">Certainly </text:span><text:span text:style-name="T2">an </text:span><text:span text:style-name="T3">integrated, secure, and analytics-driven web-based recruitment system </text:span><text:span text:style-name="T4">is necessary <text:s/>for i</text:span><text:span text:style-name="T5">ntegration of various aspects of recruitment processes seamlessly </text:span><text:span text:style-name="T4">and to </text:span><text:span text:style-name="T10"><text:s/>facilitate </text:span><text:span text:style-name="T11">engagement of applicants with the organization and </text:span><text:span text:style-name="T10">collaboration <text:s/>among various stakeholders involved in the hiring process, such as </text:span><text:span text:style-name="T11">HR and department heads</text:span></text:p>
      <text:p text:style-name="P3"><text:span text:style-name="T11"/></text:p>
      <text:p text:style-name="P3"><text:span text:style-name="T11">The goal </text:span><text:span text:style-name="T12">of our project </text:span><text:span text:style-name="T11">is to create an efficient and accessible solution that enhances the overall recruitment experience for both employers and job seekers.</text:span></text:p>
      <text:p text:style-name="P3"><text:span text:style-name="T11"/></text:p>
      <text:p text:style-name="P5"><text:span text:style-name="T6">The application will serve as a platform for the HR or respective department heads to </text:span><text:span text:style-name="T9">manage job listings, receive and review applications, and streamline the hiring workflow</text:span><text:span text:style-name="T6">. It also provides a user-friendly interface for job seekers to <text:s/></text:span><text:span text:style-name="T7">know about the available positions,</text:span><text:span text:style-name="T8">apply for them,track the status of their of their job applications.</text:span></text:p>
      <text:p text:style-name="P3"><text:span text:style-name="T11"/></text:p>
      <text:p text:style-name="P4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7T23:47:24.923900558</meta:creation-date>
    <meta:editing-duration>PT3M11S</meta:editing-duration>
    <meta:editing-cycles>2</meta:editing-cycles>
    <meta:generator>LibreOffice/6.4.7.2$Linux_X86_64 LibreOffice_project/40$Build-2</meta:generator>
    <dc:date>2024-03-18T00:11:05.216356889</dc:date>
    <meta:document-statistic meta:table-count="0" meta:image-count="0" meta:object-count="0" meta:page-count="1" meta:paragraph-count="4" meta:word-count="147" meta:character-count="1043" meta:non-whitespace-character-count="896"/>
  </office:meta>
</office:document-meta>
</file>